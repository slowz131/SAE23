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</text:p>
      <text:p text:style-name="Standard"></text:p>
      <text:p text:style-name="Standard">#variable for database connection</text:p>
      <text:p text:style-name="Standard">DB_USER=cailleaud</text:p>
      <text:p text:style-name="Standard">DB_PASS=rt</text:p>
      <text:p text:style-name="Standard">DB_NAME=sae23</text:p>
      <text:p text:style-name="Standard"></text:p>
      <text:p text:style-name="Standard"># Get the list of sensors and their types from the database</text:p>
      <text:p text:style-name="Standard">CAPTEUR=$(/opt/lampp/bin/mysql -u "$DB_USER" -p"$DB_PASS" "$DB_NAME" -N -e "SELECT NOM_SALLE, Type FROM Capteur;")</text:p>
      <text:p text:style-name="Standard"></text:p>
      <text:p text:style-name="Standard"># Loop through each sensor and listen for data</text:p>
      <text:p text:style-name="Standard">echo "$CAPTEUR" | while IFS=$'\t' read -r salle type</text:p>
      <text:p text:style-name="Standard"></text:p>
      <text:p text:style-name="Standard">do</text:p>
      <text:p text:style-name="Standard"><text:s text:c="4"/># Start a background process for each sensor</text:p>
      <text:p text:style-name="Standard"><text:s text:c="4"/>mosquitto_sub -h mqtt.iut-blagnac.fr -u student -P student -t sensors/AM107/by-room/$salle/data -p 8883 -C 1 | while read payload</text:p>
      <text:p text:style-name="Standard"><text:s text:c="4"/>do</text:p>
      <text:p text:style-name="Standard"><text:s text:c="8"/># Get the current date and time, and the sensor name from the payload</text:p>
      <text:p text:style-name="Standard"><text:s text:c="8"/>DATE=$(date "+%Y-%m-%d")</text:p>
      <text:p text:style-name="Standard"><text:s text:c="8"/>HORAIRE=$(date "+%H:%M:%S")</text:p>
      <text:p text:style-name="Standard"><text:s text:c="8"/>nom_capteur=$(echo $payload | jq -r '.[1].deviceName')</text:p>
      <text:p text:style-name="Standard"></text:p>
      <text:p text:style-name="Standard"><text:s text:c="8"/>bat=$(echo $payload | jq -r '.[1].Building')</text:p>
      <text:p text:style-name="Standard"></text:p>
      <text:p text:style-name="Standard"><text:s text:c="8"/># Create directories and files for storing logs if they don't exist</text:p>
      <text:p text:style-name="Standard"><text:s text:c="8"/>if [ ! -d "/home/lcailleaud/Documents/SAE23/BATIMENT_$bat" ];then</text:p>
      <text:p text:style-name="Standard"><text:s text:c="8"/>echo "====Création du dossier BATIMENT_$bat ===="</text:p>
      <text:p text:style-name="Standard"><text:s text:c="8"/>mkdir "/home/lcailleaud/Documents/SAE23/BATIMENT_$bat"</text:p>
      <text:p text:style-name="Standard"><text:s text:c="8"/>echo "Opération réussi avec succès !"</text:p>
      <text:p text:style-name="Standard"><text:s text:c="8"/>fi</text:p>
      <text:p text:style-name="Standard"><text:s text:c="8"/>if [ ! -d "/home/lcailleaud/Documents/SAE23/BATIMENT_$bat/$salle" ];then</text:p>
      <text:p text:style-name="Standard"><text:s text:c="8"/>echo "====Création du dossier BATIMENT_$bat/$salle ===="</text:p>
      <text:p text:style-name="Standard"><text:s text:c="8"/>mkdir "/home/lcailleaud/Documents/SAE23/BATIMENT_$bat/$salle"</text:p>
      <text:p text:style-name="Standard"><text:s text:c="8"/>echo "Opération réussi avec succès !"</text:p>
      <text:p text:style-name="Standard"><text:s text:c="8"/>fi</text:p>
      <text:p text:style-name="Standard"><text:s text:c="8"/>if [ ! -f "/home/lcailleaud/Documents/SAE23/BATIMENT_$bat/$salle/${type}_logs_bat$bat.txt" ];then</text:p>
      <text:p text:style-name="Standard"><text:s text:c="8"/>echo "====Création du fichier où les dernières valeurs seront stockées ===="</text:p>
      <text:p text:style-name="Standard"><text:s text:c="8"/>touch "/home/lcailleaud/Documents/SAE23/BATIMENT_$bat/$salle/${type}_logs_bat$bat.txt"</text:p>
      <text:p text:style-name="Standard"><text:s text:c="8"/>echo "Opération réussi avec succès !"</text:p>
      <text:p text:style-name="Standard"><text:s text:c="8"/>fi</text:p>
      <text:p text:style-name="Standard"><text:s text:c="8"/>if [ ! -f "/home/lcailleaud/Documents/SAE23/BATIMENT_$bat/$salle/${type}_logs_bat${bat}_public.txt" ];then</text:p>
      <text:p text:style-name="Standard"><text:s text:c="8"/>echo "====Création du fichier où toutes les valeurs seront stockées ===="</text:p>
      <text:p text:style-name="Standard"><text:s text:c="8"/>touch "/home/lcailleaud/Documents/SAE23/BATIMENT_$bat/$salle/${type}_logs_bat${bat}_public.txt"</text:p>
      <text:p text:style-name="Standard"><text:s text:c="8"/>echo "Opération réussi avec succès !"</text:p>
      <text:p text:style-name="Standard"><text:s text:c="8"/>fi</text:p>
      <text:p text:style-name="Standard"></text:p>
      <text:p text:style-name="Standard"><text:soft-page-break/><text:s text:c="8"/># Create files for min, max, and average values if they don't exist</text:p>
      <text:p text:style-name="Standard"><text:s text:c="8"/>logs="/home/lcailleaud/Documents/SAE23/BATIMENT_$bat/$salle/${type}_logs_bat$bat.txt"</text:p>
      <text:p text:style-name="Standard"><text:s text:c="8"/>logs_public="/home/lcailleaud/Documents/SAE23/BATIMENT_$bat/$salle/${type}_logs_bat${bat}_public.txt"</text:p>
      <text:p text:style-name="Standard"><text:tab/><text:tab/>logs_min="/home/lcailleaud/Documents/SAE23/BATIMENT_$bat/$salle/${type}_logs_min_bat$bat.txt"</text:p>
      <text:p text:style-name="Standard"><text:tab/><text:tab/>logs_max="/home/lcailleaud/Documents/SAE23/BATIMENT_$bat/$salle/${type}_logs_max_bat$bat.txt"</text:p>
      <text:p text:style-name="Standard"><text:tab/><text:tab/>logs_moy="/home/lcailleaud/Documents/SAE23/BATIMENT_$bat/$salle/${type}_logs_moy_bat$bat.txt"</text:p>
      <text:p text:style-name="Standard"></text:p>
      <text:p text:style-name="Standard"><text:s text:c="8"/># Store the value based on the type of sensor and calculate min, max, and average</text:p>
      <text:p text:style-name="Standard"><text:s text:c="8"/>if [ "$type" == "Temperature" ]; then</text:p>
      <text:p text:style-name="Standard"><text:s text:c="12"/>VALEUR=$(echo $payload | jq -r '.[0].temperature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float(ligne) for ligne in open('$logs') if ligne.strip()))")</text:p>
      <text:p text:style-name="Standard"><text:s text:c="12"/>NB_LIGNE=$(grep -c '.' $logs)</text:p>
      <text:p text:style-name="Standard"><text:s text:c="12"/>VALEUR_MOY_V1=$(python3 -c "print($SOMME / $NB_LIGNE)")</text:p>
      <text:p text:style-name="Standard"><text:s text:c="12"/>VALEUR_MOY_V2="${VALEUR_MOY_V1//./,}"</text:p>
      <text:p text:style-name="Standard"><text:s text:c="12"/>printf "%.1f\n" "$VALEUR_MOY_V2" &gt; $logs_moy</text:p>
      <text:p text:style-name="Standard"><text:s text:c="8"/>elif [ "$type" == "Humidity" ]; then</text:p>
      <text:p text:style-name="Standard"><text:s text:c="12"/>VALEUR=$(echo $payload | jq -r '.[0].humidity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float(ligne) for ligne in open('$logs') if ligne.strip()))")</text:p>
      <text:p text:style-name="Standard"><text:s text:c="12"/>NB_LIGNE=$(grep -c '.' $logs)</text:p>
      <text:p text:style-name="Standard"><text:s text:c="12"/>VALEUR_MOY_V1=$(python3 -c "print($SOMME / $NB_LIGNE)")</text:p>
      <text:p text:style-name="Standard"><text:s text:c="12"/>VALEUR_MOY_V2="${VALEUR_MOY_V1//./,}"</text:p>
      <text:p text:style-name="Standard"><text:s text:c="12"/>printf "%.1f\n" "$VALEUR_MOY_V2" &gt; $logs_moy</text:p>
      <text:p text:style-name="Standard"><text:s text:c="8"/>elif [ "$type" == "Activity" ]; then</text:p>
      <text:p text:style-name="Standard"><text:s text:c="12"/>VALEUR=$(echo $payload | jq -r '.[0].activity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CO2" ]; then</text:p>
      <text:p text:style-name="Standard"><text:soft-page-break/><text:s text:c="12"/>VALEUR=$(echo $payload | jq -r '.[0].co2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Tvoc" ]; then</text:p>
      <text:p text:style-name="Standard"><text:s text:c="12"/>VALEUR=$(echo $payload | jq -r '.[0].tvoc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Illumination" ]; then</text:p>
      <text:p text:style-name="Standard"><text:s text:c="12"/>VALEUR=$(echo $payload | jq -r '.[0].illumination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Infrared" ]; then</text:p>
      <text:p text:style-name="Standard"><text:s text:c="12"/>VALEUR=$(echo $payload | jq -r '.[0].infrared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Infrared_and_visible" ]; then</text:p>
      <text:p text:style-name="Standard"><text:s text:c="12"/>VALEUR=$(echo $payload | jq -r '.[0].infrared_and_visible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soft-page-break/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int(ligne) for ligne in open('$logs') if ligne.strip()))")</text:p>
      <text:p text:style-name="Standard"><text:s text:c="12"/>NB_LIGNE=$(grep -c '.' $logs)</text:p>
      <text:p text:style-name="Standard"><text:s text:c="12"/>VALEUR_MOY=$(($SOMME / $NB_LIGNE))</text:p>
      <text:p text:style-name="Standard"><text:s text:c="12"/>echo "$VALEUR_MOY" &gt; $logs_moy</text:p>
      <text:p text:style-name="Standard"><text:s text:c="8"/>elif [ "$type" == "Pressure" ]; then</text:p>
      <text:p text:style-name="Standard"><text:s text:c="12"/>VALEUR=$(echo $payload | jq -r '.[0].pressure')</text:p>
      <text:p text:style-name="Standard"><text:s text:c="12"/>echo "${VALEUR}" &gt;&gt; $logs</text:p>
      <text:p text:style-name="Standard"><text:s text:c="12"/>echo "${VALEUR}" &gt; $logs_public</text:p>
      <text:p text:style-name="Standard"><text:s text:c="12"/>VALEUR_MIN=$(sort -n $logs | head -n 1)</text:p>
      <text:p text:style-name="Standard"><text:tab/><text:tab/><text:tab/>echo "${VALEUR_MIN}" &gt; $logs_min</text:p>
      <text:p text:style-name="Standard"><text:s text:c="12"/>VALEUR_MAX=$(sort -n $logs | tail -n 1)</text:p>
      <text:p text:style-name="Standard"><text:tab/><text:tab/><text:tab/>echo "${VALEUR_MAX}" &gt; $logs_max</text:p>
      <text:p text:style-name="Standard"><text:s text:c="12"/>SOMME=$(python3 -c "print(sum(float(ligne) for ligne in open('$logs') if ligne.strip()))")</text:p>
      <text:p text:style-name="Standard"><text:s text:c="12"/>NB_LIGNE=$(grep -c '.' $logs)</text:p>
      <text:p text:style-name="Standard"><text:s text:c="12"/>VALEUR_MOY_V1=$(python3 -c "print($SOMME / $NB_LIGNE)")</text:p>
      <text:p text:style-name="Standard"><text:s text:c="12"/>VALEUR_MOY_V2="${VALEUR_MOY_V1//./,}"</text:p>
      <text:p text:style-name="Standard"><text:s text:c="12"/>printf "%.1f\n" "$VALEUR_MOY_V2" &gt; $logs_moy</text:p>
      <text:p text:style-name="Standard"><text:s text:c="8"/></text:p>
      <text:p text:style-name="Standard"><text:s text:c="8"/># Handle unknown sensor types</text:p>
      <text:p text:style-name="Standard"><text:s text:c="8"/>else</text:p>
      <text:p text:style-name="Standard"><text:s text:c="12"/>echo "Type inconnu pour $salle : $type"</text:p>
      <text:p text:style-name="Standard"><text:s text:c="12"/>continue</text:p>
      <text:p text:style-name="Standard"><text:s text:c="8"/>fi</text:p>
      <text:p text:style-name="Standard"></text:p>
      <text:p text:style-name="Standard"><text:s text:c="8"/># Insert the values into the database in the "Mesure" table</text:p>
      <text:p text:style-name="Standard"><text:s text:c="8"/>/opt/lampp/bin/mysql -u "$DB_USER" -p"$DB_PASS" "$DB_NAME" -e "INSERT INTO Mesure (Date, Horaire, Valeur, NOM_CAPTEUR) VALUES ('$DATE', '$HORAIRE', $VALEUR, '$nom_capteur');"</text:p>
      <text:p text:style-name="Standard"><text:s text:c="8"/>echo "Mesure insérée pour $nom_capteur : $VALEUR"</text:p>
      <text:p text:style-name="Standard"><text:s text:c="4"/># Allow the background process to continue running for each sensor</text:p>
      <text:p text:style-name="Standard"><text:s text:c="4"/>done &amp;</text:p>
      <text:p text:style-name="Standard">done</text:p>
      <text:p text:style-name="Standard"></text:p>
      <text:p text:style-name="Standard">echo 'Terminé !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16:52:41.530130687</meta:creation-date>
    <dc:date>2026-06-21T16:53:46.347251038</dc:date>
    <meta:editing-duration>PT1M5S</meta:editing-duration>
    <meta:editing-cycles>1</meta:editing-cycles>
    <meta:document-statistic meta:table-count="0" meta:image-count="0" meta:object-count="0" meta:page-count="4" meta:paragraph-count="180" meta:word-count="894" meta:character-count="8989" meta:non-whitespace-character-count="6605"/>
    <meta:generator>LibreOffice/7.3.7.2$Linux_X86_64 LibreOffice_project/30$Build-2</meta:generator>
  </office:meta>
</office:document-meta>
</file>